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2d08" officeooo:paragraph-rsid="00212d08"/>
    </style:style>
    <style:style style:name="P2" style:family="paragraph" style:parent-style-name="Standard">
      <style:text-properties officeooo:rsid="00212d08" officeooo:paragraph-rsid="00212d08"/>
    </style:style>
    <style:style style:name="P3" style:family="paragraph" style:parent-style-name="Standard">
      <style:paragraph-properties fo:break-before="page"/>
      <style:text-properties officeooo:rsid="00212d08" officeooo:paragraph-rsid="00212d08"/>
    </style:style>
    <style:style style:name="P4" style:family="paragraph" style:parent-style-name="Standard">
      <style:text-properties officeooo:rsid="00217a72" officeooo:paragraph-rsid="00217a72"/>
    </style:style>
    <style:style style:name="P5" style:family="paragraph" style:parent-style-name="Standard">
      <style:text-properties style:text-underline-style="solid" style:text-underline-width="auto" style:text-underline-color="font-color" fo:font-weight="bold" officeooo:rsid="00212d08" officeooo:paragraph-rsid="00212d0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corrack – Half Orc – Barbarian</text:p>
      <text:p text:style-name="P1">Borloin Gorsk – Dwarf – Cleric</text:p>
      <text:p text:style-name="P1">Lidda Shoon - <text:s/>Halfling – Rogue</text:p>
      <text:p text:style-name="P1">Imahil DeVonce – Half Elf – Wizard</text:p>
      <text:p text:style-name="P1">Jeerdan Darcy – Human – Fighter</text:p>
      <text:p text:style-name="P3"/>
      <text:p text:style-name="P5">Krostonid Durturim – Dragonborn – Warlock</text:p>
      <text:p text:style-name="P1"/>
      <text:p text:style-name="P4">Ally:</text:p>
      <text:p text:style-name="P1">Xtlri eyes, are a mesmerizing shade of azure, betray an intelligence far beyond its diminutive form, and its laughter echoes with a haunting melody that sends shivers down the spine. Yet, despite its sinister appearance, the imp serves Krostonid with unwavering loyalty, its every action guided by the inscrutable will of the Old One. Together, master and minion weave a tapestry of darkness and deception, their alliance forged in the shadows of ancient secrets and forbidden knowled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8:13:59.195118443</meta:creation-date>
    <meta:generator>LibreOffice/7.3.7.2$Linux_X86_64 LibreOffice_project/30$Build-2</meta:generator>
    <dc:date>2025-06-19T18:37:46.042703785</dc:date>
    <meta:editing-duration>PT3M12S</meta:editing-duration>
    <meta:editing-cycles>3</meta:editing-cycles>
    <meta:document-statistic meta:table-count="0" meta:image-count="0" meta:object-count="0" meta:page-count="2" meta:paragraph-count="8" meta:word-count="104" meta:character-count="692" meta:non-whitespace-character-count="584"/>
  </office:meta>
</office:document-meta>
</file>