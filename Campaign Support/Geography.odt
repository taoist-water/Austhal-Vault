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1a99" officeooo:paragraph-rsid="001d1a99"/>
    </style:style>
    <style:style style:name="P2" style:family="paragraph" style:parent-style-name="Standard" style:list-style-name="L3">
      <style:text-properties officeooo:rsid="001d1a99" officeooo:paragraph-rsid="001d1a99"/>
    </style:style>
    <style:style style:name="T1" style:family="text">
      <style:text-properties officeooo:rsid="001d1a9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inent: Austhal</text:p>
      <text:list xml:id="list695315185" text:style-name="L3">
        <text:list-item>
          <text:p text:style-name="P2">Regions;</text:p>
          <text:list>
            <text:list-item>
              <text:p text:style-name="P2">5 Duchies</text:p>
              <text:list>
                <text:list-item>
                  <text:p text:style-name="P2">De Vonce Duchy</text:p>
                </text:list-item>
                <text:list-item>
                  <text:p text:style-name="P2">Duchy of Corvus</text:p>
                </text:list-item>
                <text:list-item>
                  <text:p text:style-name="P2">Duchy of Aerthos</text:p>
                </text:list-item>
                <text:list-item>
                  <text:p text:style-name="P2">Duchy of Valerius</text:p>
                </text:list-item>
                <text:list-item>
                  <text:p text:style-name="P2">Duchy of Stonereach</text:p>
                  <text:p text:style-name="P2"/>
                </text:list-item>
              </text:list>
            </text:list-item>
            <text:list-item>
              <text:p text:style-name="P2">The Kingdom of Chalcred</text:p>
              <text:p text:style-name="P2"/>
            </text:list-item>
            <text:list-item>
              <text:p text:style-name="P2">The Silted Marshes</text:p>
              <text:p text:style-name="P2"/>
            </text:list-item>
            <text:list-item>
              <text:p text:style-name="P2">The Wastelands</text:p>
              <text:p text:style-name="P2"/>
            </text:list-item>
            <text:list-item>
              <text:p text:style-name="P2">The Ubaraz Kingdom</text:p>
              <text:p text:style-name="P2"/>
            </text:list-item>
            <text:list-item>
              <text:p text:style-name="P2">The Kald Mountain territory</text:p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18:13:40.805064819</meta:creation-date>
    <meta:generator>LibreOffice/7.3.7.2$Linux_X86_64 LibreOffice_project/30$Build-2</meta:generator>
    <dc:date>2025-08-05T18:19:48.217941712</dc:date>
    <meta:editing-duration>PT6M7S</meta:editing-duration>
    <meta:editing-cycles>1</meta:editing-cycles>
    <meta:document-statistic meta:table-count="0" meta:image-count="0" meta:object-count="0" meta:page-count="1" meta:paragraph-count="19" meta:word-count="54" meta:character-count="234" meta:non-whitespace-character-count="211"/>
  </office:meta>
</office:document-meta>
</file>