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4984" officeooo:paragraph-rsid="000249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ngs like;</text:p>
      <text:p text:style-name="P1"/>
      <text:p text:style-name="P1">- Over all timeline</text:p>
      <text:p text:style-name="P1">- secrets</text:p>
      <text:p text:style-name="P1">- market tables</text:p>
      <text:p text:style-name="P1">- inspirational idea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8:18:51.820227699</meta:creation-date>
    <meta:generator>LibreOffice/7.3.7.2$Linux_X86_64 LibreOffice_project/30$Build-2</meta:generator>
    <dc:date>2025-06-19T18:20:39.550239452</dc:date>
    <meta:editing-duration>PT1M48S</meta:editing-duration>
    <meta:editing-cycles>1</meta:editing-cycles>
    <meta:document-statistic meta:table-count="0" meta:image-count="0" meta:object-count="0" meta:page-count="1" meta:paragraph-count="5" meta:word-count="14" meta:character-count="76" meta:non-whitespace-character-count="67"/>
  </office:meta>
</office:document-meta>
</file>