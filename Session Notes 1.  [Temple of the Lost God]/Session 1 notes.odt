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7bfcd"/>
    </style:style>
    <style:style style:name="P2" style:family="paragraph" style:parent-style-name="Standard">
      <style:text-properties fo:font-weight="bold" officeooo:rsid="0007bfcd" officeooo:paragraph-rsid="0007bfcd"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officeooo:rsid="0007fb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tro of characters. </text:p>
      <text:p text:style-name="Standard"/>
      <text:p text:style-name="P2">TL;DR</text:p>
      <text:p text:style-name="P1">Go to jungle island. </text:p>
      <text:p text:style-name="P1">Meet at Blue Fin Inn. </text:p>
      <text:p text:style-name="P1">Travel to kobold temple of the lost god. </text:p>
      <text:p text:style-name="P1">Kill the <text:a xlink:type="simple" xlink:href="https://www.scabard.com/pbs/campaign/2941434/character/2943273" text:style-name="Internet_20_link" text:visited-style-name="Visited_20_Internet_20_Link">Kobold Shaman</text:a> and the <text:a xlink:type="simple" xlink:href="https://www.scabard.com/pbs/campaign/2941434/group/2943226" text:style-name="Internet_20_link" text:visited-style-name="Visited_20_Internet_20_Link">Temple Kobolds</text:a>. </text:p>
      <text:p text:style-name="P1">Overcome traps. </text:p>
      <text:p text:style-name="P1">Escape. </text:p>
      <text:p text:style-name="P1">Profit. </text:p>
      <text:p text:style-name="Standard"/>
      <text:p text:style-name="Standard">The archaeologist <text:span text:style-name="T1">[Eadan Redlion] </text:span>has recruited the PC's to travel with them to Jungle Island and explore the Kobold temple of the Lost <text:a xlink:type="simple" xlink:href="https://www.scabard.com/pbs/campaign/2941434/item/2943227" text:style-name="Internet_20_link" text:visited-style-name="Visited_20_Internet_20_Link">God</text:a>. </text:p>
      <text:p text:style-name="Standard">His research of the culture and history of Jungle Island lends him to believe there is a solid gold statue of a<text:span text:style-name="T1">n</text:span> eons lost God.</text:p>
      <text:p text:style-name="Standard"/>
      <text:p text:style-name="Standard">They travel to Jungle Island on the Seappar, where they lodge at the <text:a xlink:type="simple" xlink:href="https://www.scabard.com/pbs/campaign/2941434/place/2943180" text:style-name="Internet_20_link" text:visited-style-name="Visited_20_Internet_20_Link">Blue Fin Inn</text:a>. </text:p>
      <text:p text:style-name="Standard"/>
      <text:p text:style-name="Standard">The Archeologist has arranged for indigenous guides to take them to the site of the Koblod temple of the Lost God.</text:p>
      <text:p text:style-name="Standard"/>
      <text:p text:style-name="P3">Minor encounter </text:p>
      <text:p text:style-name="Standard">Along the way the PC's find a horrific totem covered in fresh blood which frightens the indigenous guides away with the groups supplies. The archaeologist encourages the PC's on as he knows the temple entrance is not far away. </text:p>
      <text:p text:style-name="Standard"/>
      <text:p text:style-name="Standard">The PC's find the temple entrance. </text:p>
      <text:p text:style-name="Standard"/>
      <text:p text:style-name="Standard">they find evidence of recent Kobold activity. </text:p>
      <text:p text:style-name="Standard"><text:s/></text:p>
      <text:p text:style-name="Standard">Basic adventure structure; </text:p>
      <text:p text:style-name="Standard">- 3 minor encounters before major encounter. </text:p>
      <text:p text:style-name="Standard">- exploring is a relevant skill check. Failure makes the minor encounter a little harder, than if the skill check was a success. </text:p>
      <text:p text:style-name="Standard"><text:s/></text:p>
      <text:p text:style-name="Standard"><text:s/></text:p>
      <text:p text:style-name="Standard">Pit trap encounter: </text:p>
      <text:p text:style-name="Standard">- 20ft lon 10 ft deep pit as wide as the hallway. bottom with rusted spikes. </text:p>
      <text:p text:style-name="Standard">- Kobolds use invasive tree roots in the ceiling to circumvent the pit trap. only usable by small Chars. </text:p>
      <text:p text:style-name="Standard">- if explore skill check failed, 8 kobolds ambush the PCs here. If success it is only 4. </text:p>
      <text:p text:style-name="Standard"><text:s/></text:p>
      <text:p text:style-name="Standard">Wall spike encounter: </text:p>
      <text:p text:style-name="Standard">- 45ft long hallway. </text:p>
      <text:p text:style-name="Standard">- evidence of some wall spikes have been set off. </text:p>
      <text:p text:style-name="Standard">- triggered by certain glyphed stones on the floor. </text:p>
      <text:p text:style-name="Standard">- kobolds have learned which to stand on. </text:p>
      <text:p text:style-name="Standard">- some dex based test to get through, easy DC if treat as difficult terrain. Harder DC if moving normal speed. harder if running. </text:p>
      <text:p text:style-name="Standard">- if explored check failed, kobolds at the end of hall throwing javlins at the party. adding to DC to pass. </text:p>
      <text:p text:style-name="Standard">- if explore check succeded the kobolds arent there. </text:p>
      <text:p text:style-name="Standard"><text:soft-page-break/><text:s/></text:p>
      <text:p text:style-name="Standard"><text:a xlink:type="simple" xlink:href="https://www.scabard.com/pbs/campaign/2941434/event/4760032" text:style-name="Internet_20_link" text:visited-style-name="Visited_20_Internet_20_Link">Spider nest</text:a> encounter: </text:p>
      <text:p text:style-name="Standard">- large 30by 50 room, support pillars throughout 8ft dia. </text:p>
      <text:p text:style-name="Standard">- nest in opposite corner of room, in a crumbled wall and small cavern space. </text:p>
      <text:p text:style-name="Standard">- treasure in the main nest form old advent party. </text:p>
      <text:p text:style-name="Standard">room is full of webs, becoming tunnel like as they close to the nest. </text:p>
      <text:p text:style-name="Standard">- room is difficult terrain. </text:p>
      <text:p text:style-name="Standard">- disturbing the web alerts the spiders. </text:p>
      <text:p text:style-name="Standard">- explore skill fail causes one of the party to fail to notice the webs and become entangled. spiders surprise the party and entangled members needs to break free. </text:p>
      <text:p text:style-name="Standard">- success they notice the webs and are not surprised. </text:p>
      <text:p text:style-name="Standard"/>
      <text:p text:style-name="Standard">Major encounter: </text:p>
      <text:p text:style-name="Standard">- Kobold den in main chamber of temple. </text:p>
      <text:p text:style-name="Standard">- Kobold priest/shaman Boss. </text:p>
      <text:p text:style-name="Standard">- Dozens of Kobolds and families. </text:p>
      <text:p text:style-name="Standard">- treasure in Den from another adventure party, rads on the island inhabitants. </text:p>
      <text:p text:style-name="Standard">- Lost god statue on pedestal in ante chamber behind den. </text:p>
      <text:p text:style-name="Standard">- floor trapped, stones shoot poisoned darts from the walls. </text:p>
      <text:p text:style-name="Standard">- taking idol from pedestal causes roof to collapse and inflow water from nearby river to flood the temple. </text:p>
      <text:p text:style-name="Standard"><text:s/></text:p>
      <text:p text:style-name="Standard">Resolution; </text:p>
      <text:p text:style-name="Standard">- party survives. </text:p>
      <text:p text:style-name="Standard">- returns to settlement. </text:p>
      <text:p text:style-name="Standard">- if need more game time, require survival checks to get back alive or be consumed by the jungle. </text:p>
      <text:p text:style-name="Standard">- give lost god statue to acheologist, get paid. </text:p>
      <text:p text:style-name="Standard"><text:s/></text:p>
      <text:p text:style-name="Standard"><text:s/></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8:17:07.554479559</meta:creation-date>
    <meta:generator>LibreOffice/7.3.7.2$Linux_X86_64 LibreOffice_project/30$Build-2</meta:generator>
    <dc:date>2025-07-22T18:36:02.166060442</dc:date>
    <meta:editing-duration>PT17M38S</meta:editing-duration>
    <meta:editing-cycles>3</meta:editing-cycles>
    <meta:document-statistic meta:table-count="0" meta:image-count="0" meta:object-count="0" meta:page-count="2" meta:paragraph-count="62" meta:word-count="562" meta:character-count="3153" meta:non-whitespace-character-count="2586"/>
  </office:meta>
</office:document-meta>
</file>