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716e" officeooo:paragraph-rsid="0020716e"/>
    </style:style>
    <style:style style:name="P2" style:family="paragraph" style:parent-style-name="Standard">
      <style:text-properties officeooo:rsid="0020716e" officeooo:paragraph-rsid="0020716e"/>
    </style:style>
    <style:style style:name="P3" style:family="paragraph" style:parent-style-name="Standard">
      <style:text-properties officeooo:paragraph-rsid="0020716e"/>
    </style:style>
    <style:style style:name="P4" style:family="paragraph" style:parent-style-name="Standard">
      <style:text-properties officeooo:rsid="002402c9" officeooo:paragraph-rsid="002402c9"/>
    </style:style>
    <style:style style:name="P5" style:family="paragraph" style:parent-style-name="Text_20_body">
      <style:text-properties officeooo:paragraph-rsid="0020716e"/>
    </style:style>
    <style:style style:name="P6" style:family="paragraph" style:parent-style-name="Text_20_body">
      <style:text-properties officeooo:paragraph-rsid="0020a20a"/>
    </style:style>
    <style:style style:name="T1" style:family="text">
      <style:text-properties officeooo:rsid="0020716e"/>
    </style:style>
    <style:style style:name="T2" style:family="text">
      <style:text-properties officeooo:rsid="00222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adan Redlion </text:h>
      <text:p text:style-name="P3">The Archeologist who wanted the Lost god statue.</text:p>
      <text:p text:style-name="P3"/>
      <text:p text:style-name="P5">The archeologist that hires the PCs to find the Lost <text:a xlink:type="simple" xlink:href="https://www.scabard.com/pbs/campaign/2941434/item/2943227" text:style-name="Internet_20_link" text:visited-style-name="Visited_20_Internet_20_Link">God</text:a> Statue in the Kobold Temple of the lost God.</text:p>
      <text:p text:style-name="P6">Allowed Archmage Eldri<text:span text:style-name="T2">o</text:span>n to study it, who gave it to Imaihil De Vonce.</text:p>
      <text:p text:style-name="P6">It was stolen by Lidda and smuggled out of Nevarellon by Lidda.</text:p>
      <text:p text:style-name="P6">Is the owner of the Gyphed Skull.</text:p>
      <text:p text:style-name="P3"><text:span text:style-name="T1">A</text:span>ssociate <text:span text:style-name="T1">of </text:span>Archmage Eldrin </text:p>
      <text:p text:style-name="P2"/>
      <text:p text:style-name="P2"/>
      <text:h text:style-name="P1" text:outline-level="1">Tythius De Vonce</text:h>
      <text:p text:style-name="P4">Imahil De Vonce’s Father. </text:p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8:13:59.195118443</meta:creation-date>
    <meta:generator>LibreOffice/7.3.7.2$Linux_X86_64 LibreOffice_project/30$Build-2</meta:generator>
    <dc:date>2025-07-22T18:45:05.822679932</dc:date>
    <meta:editing-duration>PT8M33S</meta:editing-duration>
    <meta:editing-cycles>4</meta:editing-cycles>
    <meta:document-statistic meta:table-count="0" meta:image-count="0" meta:object-count="0" meta:page-count="1" meta:paragraph-count="9" meta:word-count="73" meta:character-count="400" meta:non-whitespace-character-count="333"/>
  </office:meta>
</office:document-meta>
</file>