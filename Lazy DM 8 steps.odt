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f9c8" officeooo:paragraph-rsid="0014f9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7069634" text:style-name="L1">
        <text:list-item>
          <text:p text:style-name="P1">Review characters</text:p>
        </text:list-item>
        <text:list-item>
          <text:p text:style-name="P1">create a strong start</text:p>
        </text:list-item>
        <text:list-item>
          <text:p text:style-name="P1">outline potential scenes</text:p>
        </text:list-item>
        <text:list-item>
          <text:p text:style-name="P1">Define secrets and clues</text:p>
        </text:list-item>
        <text:list-item>
          <text:p text:style-name="P1">Develop fantastic locations</text:p>
        </text:list-item>
        <text:list-item>
          <text:p text:style-name="P1">Outline important NPCs</text:p>
        </text:list-item>
        <text:list-item>
          <text:p text:style-name="P1">Choose relevant monsters</text:p>
        </text:list-item>
        <text:list-item>
          <text:p text:style-name="P1">select magic items rewar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0:09:06.914199783</meta:creation-date>
    <meta:generator>LibreOffice/7.3.7.2$Linux_X86_64 LibreOffice_project/30$Build-2</meta:generator>
    <dc:date>2025-06-19T20:11:30.525806908</dc:date>
    <meta:editing-duration>PT2M23S</meta:editing-duration>
    <meta:editing-cycles>1</meta:editing-cycles>
    <meta:document-statistic meta:table-count="0" meta:image-count="0" meta:object-count="0" meta:page-count="1" meta:paragraph-count="8" meta:word-count="34" meta:character-count="201" meta:non-whitespace-character-count="183"/>
  </office:meta>
</office:document-meta>
</file>