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ba81"/>
    </style:style>
    <style:style style:name="P2" style:family="paragraph" style:parent-style-name="Standard">
      <style:text-properties fo:font-weight="bold" officeooo:rsid="0005ba81" officeooo:paragraph-rsid="0005ba8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L;DR</text:p>
      <text:p text:style-name="P1"/>
      <text:p text:style-name="P1"/>
      <text:p text:style-name="P1">Basic adventure structure; </text:p>
      <text:p text:style-name="P1">- 3 minor encounters before major encounter. </text:p>
      <text:p text:style-name="P1">- exploring is a relevant skill check. Failure makes the minor encounter a little harder, than if the skill check was a success.</text:p>
      <text:p text:style-name="P1"/>
      <text:p text:style-name="P2">Minor Encounter 1;</text:p>
      <text:p text:style-name="P2"/>
      <text:p text:style-name="P2">Minor Encounter 2;</text:p>
      <text:p text:style-name="P2"/>
      <text:p text:style-name="P2">Minor Encounter 3;</text:p>
      <text:p text:style-name="P2"/>
      <text:p text:style-name="P2">Major Encounter 1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8:17:07.554479559</meta:creation-date>
    <meta:generator>LibreOffice/7.3.7.2$Linux_X86_64 LibreOffice_project/30$Build-2</meta:generator>
    <dc:date>2025-07-22T18:32:19.167920241</dc:date>
    <meta:editing-duration>PT1M21S</meta:editing-duration>
    <meta:editing-cycles>1</meta:editing-cycles>
    <meta:document-statistic meta:table-count="0" meta:image-count="0" meta:object-count="0" meta:page-count="1" meta:paragraph-count="8" meta:word-count="46" meta:character-count="277" meta:non-whitespace-character-count="237"/>
  </office:meta>
</office:document-meta>
</file>